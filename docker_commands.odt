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2be8" officeooo:paragraph-rsid="000c2be8"/>
    </style:style>
    <style:style style:name="P2" style:family="paragraph" style:parent-style-name="Standard">
      <style:text-properties officeooo:rsid="000d84d4" officeooo:paragraph-rsid="000d84d4"/>
    </style:style>
    <style:style style:name="P3" style:family="paragraph" style:parent-style-name="Standard">
      <style:text-properties fo:font-weight="bold" officeooo:rsid="000c2be8" officeooo:paragraph-rsid="000c2be8" style:font-weight-asian="bold" style:font-weight-complex="bold"/>
    </style:style>
    <style:style style:name="T1" style:family="text">
      <style:text-properties officeooo:rsid="000c2be8"/>
    </style:style>
    <style:style style:name="T2" style:family="text">
      <style:text-properties officeooo:rsid="000d84d4"/>
    </style:style>
    <style:style style:name="T3" style:family="text">
      <style:text-properties officeooo:rsid="000f0f4c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Docker name:</text:span> sql_server_demo </text:p>
      <text:p text:style-name="P2"><text:span text:style-name="T4">Docker id:</text:span> <text:s/><text:span text:style-name="T1">c03800ccf7b9</text:span></text:p>
      <text:p text:style-name="P1"/>
      <text:p text:style-name="P3"># Copiar o ficheiro de Custos (com o espaço e acento corretos)</text:p>
      <text:p text:style-name="P1"><text:span text:style-name="T3">sudo </text:span>docker cp "Dim_Custos_Funcionários.csv" c03800ccf7b9:/tmp/dim_custos_funcionarios.csv</text:p>
      <text:p text:style-name="P1"/>
      <text:p text:style-name="P3"># Copiar o de Atendimentos</text:p>
      <text:p text:style-name="P1"><text:span text:style-name="T3">sudo </text:span>docker cp Fatos_Atendimentos.csv c03800ccf7b9:/tmp/fatos_atendimentos.csv</text:p>
      <text:p text:style-name="P1"/>
      <text:p text:style-name="P3"># Copiar o de Fretados</text:p>
      <text:p text:style-name="P1"><text:span text:style-name="T3">sudo </text:span>docker cp Fatos_Fretados.csv c03800ccf7b9:/tmp/fatos_fretados.csv</text:p>
      <text:p text:style-name="P1"/>
      <text:p text:style-name="P1"/>
      <text:p text:style-name="P3">Command to navigate the docker</text:p>
      <text:p text:style-name="P1"/>
      <text:p text:style-name="P1">docker exec -it sql_server_demo bas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5T14:01:10.230830308</meta:creation-date>
    <dc:date>2026-07-15T17:03:07.680997202</dc:date>
    <meta:editing-duration>PT1H6M58S</meta:editing-duration>
    <meta:editing-cycles>1</meta:editing-cycles>
    <meta:document-statistic meta:table-count="0" meta:image-count="0" meta:object-count="0" meta:page-count="1" meta:paragraph-count="10" meta:word-count="53" meta:character-count="467" meta:non-whitespace-character-count="422"/>
    <meta:generator>LibreOffice/24.2.7.2$Linux_X86_64 LibreOffice_project/420$Build-2</meta:generator>
  </office:meta>
</office:document-meta>
</file>